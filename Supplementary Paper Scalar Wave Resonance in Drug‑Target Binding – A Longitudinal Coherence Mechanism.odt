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96cm"/>
    </style:style>
    <style:style style:name="Table1.B" style:family="table-column">
      <style:table-column-properties style:column-width="7.243cm"/>
    </style:style>
    <style:style style:name="Table1.C" style:family="table-column">
      <style:table-column-properties style:column-width="5.262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plementary Paper: Scalar Wave Resonance in Drug‑Target Binding – A Longitudinal Coherence Mechanism</text:h>
      <text:p text:style-name="Text_20_body"><text:span text:style-name="Strong_20_Emphasis">Author</text:span>: Peter James Thompson<text:line-break/><text:span text:style-name="Strong_20_Emphasis">Date</text:span>: June 2026<text:line-break/><text:span text:style-name="Strong_20_Emphasis">Relation to Main Paper</text:span>: <text:span text:style-name="Emphasis">Harmonic Grand Unified Theory for Rational Drug Design</text:span> (Thompson, 2026) – Supplementary Material S1<text:line-break/></text:p>
      <text:p text:style-name="Horizontal_20_Line"/>
      <text:h text:style-name="Heading_20_2" text:outline-level="2">Abstract</text:h>
      <text:p text:style-name="Text_20_body">The main drug‑design paper introduces a coherence score based on molecular weight, a 19:13 ratio, and vibrational frequencies. However, it does not explicitly consider <text:span text:style-name="Strong_20_Emphasis">wave polarisation</text:span> or <text:span text:style-name="Strong_20_Emphasis">phase offset</text:span> between the drug’s normal modes and the target’s vibrations. This supplementary paper fills that gap by presenting the <text:span text:style-name="Strong_20_Emphasis">scalar wave mechanism</text:span> – a longitudinal compression of the Tau lattice that occurs when two oscillators are aligned and in‑phase. The scalar wave node creates a region where the paired potential condition <text:span text:style-name="Source_20_Text">m + m' = 0</text:span> is locally satisfied, amplifying the handshake energy by a factor of up to 5× beyond the base amplification (10,000×). We derive a scalar coherence factor</text:p>
      <text:p text:style-name="Text_20_body"><text:span text:style-name="Source_20_Text">C_scalar = C_base × (1+cosΔφ)/2 × S_dir</text:span></text:p>
      <text:p text:style-name="Text_20_body">with <text:span text:style-name="Source_20_Text">S_dir = 1/9</text:span> for randomly oriented molecules (solution or powder) and approaching 1 for aligned systems. The resulting model is implemented in the drug‑screening GUI as a <text:span text:style-name="Strong_20_Emphasis">Scalar Mode toggle</text:span> and a <text:span text:style-name="Strong_20_Emphasis">Phase Offset slider</text:span>. This extension transforms the screening tool from a static affinity predictor into a dynamic resonance tuner, directly linking drug potency to the same longitudinal wave phenomena observed in sonoluminescence, plasma energy extraction, and lightning.</text:p>
      <text:p text:style-name="Horizontal_20_Line"/>
      <text:h text:style-name="Heading_20_2" text:outline-level="2">1. Introduction</text:h>
      <text:p text:style-name="Text_20_body">The main paper (Thompson, 2026) defines the binding coherence between a drug <text:span text:style-name="Source_20_Text">D</text:span> and a target <text:span text:style-name="Source_20_Text">T</text:span> as:</text:p>
      <text:p text:style-name="Text_20_body"><text:span text:style-name="Source_20_Text">C_base = R × P × S × exp( – (A_magic + ratio_penalty) )</text:span></text:p>
      <text:p text:style-name="Text_20_body">where <text:span text:style-name="Source_20_Text">R</text:span> (resonance), <text:span text:style-name="Source_20_Text">P</text:span> (cutoff penalty), <text:span text:style-name="Source_20_Text">S</text:span> (dimensional exponent resonance), <text:span text:style-name="Source_20_Text">A_magic</text:span> and <text:span text:style-name="Source_20_Text">ratio_penalty</text:span> are derived from the 27 Hz anchor, the 19:13:4 ratio, and the 230th subharmonic cutoff. That model correctly ranks known drug‑target pairs but treats the vibrational waves as <text:span text:style-name="Strong_20_Emphasis">scalar magnitudes</text:span> only – it ignores the fact that waves have direction and phase.</text:p>
      <text:p text:style-name="Text_20_body">In the Harmonic Framework, every molecular vibration is a transverse wave in the Tau lattice. When two transverse waves interfere, their <text:span text:style-name="Strong_20_Emphasis">longitudinal component</text:span> – the compression and rarefaction along the line of interaction – is responsible for energy exchange (the handshake). This longitudinal component is a <text:span text:style-name="Strong_20_Emphasis">scalar wave</text:span> (Tesla, 1890s; sonoluminescence literature). It has no transverse extent and does not disperse.</text:p>
      <text:p text:style-name="Text_20_body">This supplementary paper formalises the scalar wave contribution to drug‑target binding and shows <text:soft-page-break/>how it can be exploited to increase therapeutic potency without changing the drug’s chemical structure – simply by <text:span text:style-name="Strong_20_Emphasis">tuning the relative phase</text:span> or <text:span text:style-name="Strong_20_Emphasis">orienting the molecule</text:span>.</text:p>
      <text:p text:style-name="Horizontal_20_Line"/>
      <text:h text:style-name="Heading_20_2" text:outline-level="2">2. Scalar Wave Formation from Two Interacting Oscillators</text:h>
      <text:p text:style-name="Text_20_body">Consider a drug molecule with a set of normal mode frequencies <text:span text:style-name="Source_20_Text">{f_d}</text:span> and a target protein with frequencies <text:span text:style-name="Source_20_Text">{f_t}</text:span>. For a single mode pair <text:span text:style-name="Source_20_Text">(f_d, f_t)</text:span>, let the displacement vectors of the drug and target be <text:span text:style-name="Source_20_Text">u_d</text:span> and <text:span text:style-name="Source_20_Text">u_t</text:span>. The interaction depends on the projection of these vectors onto the line joining the two oscillators (the intermolecular axis <text:span text:style-name="Source_20_Text">r̂</text:span>).</text:p>
      <text:p text:style-name="Text_20_body">The net displacement along <text:span text:style-name="Source_20_Text">r̂</text:span> is:</text:p>
      <text:p text:style-name="Text_20_body"><text:span text:style-name="Source_20_Text">u_parallel = (u_d · r̂) + (u_t · r̂)</text:span></text:p>
      <text:p text:style-name="Text_20_body">If the two oscillations are sinusoidal with amplitudes <text:span text:style-name="Source_20_Text">A_d</text:span>, <text:span text:style-name="Source_20_Text">A_t</text:span>, angular frequencies <text:span text:style-name="Source_20_Text">ω_d = 2πf_d</text:span>, <text:span text:style-name="Source_20_Text">ω_t = 2πf_t</text:span>, and a relative phase <text:span text:style-name="Source_20_Text">Δφ = φ_t – φ_d</text:span>, then the instantaneous longitudinal displacement is:</text:p>
      <text:p text:style-name="Text_20_body"><text:span text:style-name="Source_20_Text">u_parallel(t) = A_d cos(ω_d t) cosθ_d + A_t cos(ω_t t + Δφ) cosθ_t</text:span></text:p>
      <text:p text:style-name="Text_20_body">where <text:span text:style-name="Source_20_Text">cosθ_d = (u_d·r̂)/|u_d|</text:span> and similarly for <text:span text:style-name="Source_20_Text">cosθ_t</text:span>.</text:p>
      <text:p text:style-name="Text_20_body">When <text:span text:style-name="Source_20_Text">ω_d ≈ ω_t</text:span> (the resonance condition), the two oscillations beat. The <text:span text:style-name="Strong_20_Emphasis">scalar wave node</text:span> – the region of maximum constructive interference – occurs when the two waves are <text:span text:style-name="Strong_20_Emphasis">in‑phase</text:span> (<text:span text:style-name="Source_20_Text">Δφ = 0°</text:span>) and <text:span text:style-name="Strong_20_Emphasis">aligned</text:span> (<text:span text:style-name="Source_20_Text">cosθ_d = cosθ_t = 1</text:span>). In that case <text:span text:style-name="Source_20_Text">u_parallel(t) = (A_d + A_t) cos(ωt)</text:span>, a pure longitudinal wave of maximal amplitude. If <text:span text:style-name="Source_20_Text">Δφ = 180°</text:span>, the waves cancel along <text:span text:style-name="Source_20_Text">r̂</text:span>, producing no scalar node (pure transverse interference).</text:p>
      <text:p text:style-name="Horizontal_20_Line"/>
      <text:h text:style-name="Heading_20_2" text:outline-level="2">3. Phase Factor and Directionality in the Coherence Score (Corrected)</text:h>
      <text:p text:style-name="Text_20_body">To include scalar wave effects, we modify the base coherence as:</text:p>
      <text:p text:style-name="Text_20_body"><text:span text:style-name="Source_20_Text">C_scalar = C_base × f_phase(Δφ) × S_dir</text:span></text:p>
      <text:p text:style-name="Text_20_body">where:</text:p>
      <text:list xml:id="list5307505396546760481" text:style-name="L6">
        <text:list-item>
          <text:p text:style-name="P7"><text:span text:style-name="Source_20_Text">f_phase(Δφ) = (1 + cos Δφ)/2</text:span> ranges from 0 (fully out‑of‑phase) to 1 (perfectly in‑phase). This is the normalised power of the scalar wave component.</text:p>
        </text:list-item>
        <text:list-item>
          <text:p text:style-name="P7"><text:span text:style-name="Source_20_Text">S_dir</text:span> is the orientation alignment factor.</text:p>
        </text:list-item>
      </text:list>
      <text:h text:style-name="Heading_20_3" text:outline-level="3">3.1 Random Orientation (Solution or Powder)</text:h>
      <text:p text:style-name="Text_20_body">For randomly oriented molecules, the average squared projection of a single oscillator onto an arbitrary axis is <text:span text:style-name="Source_20_Text">⟨cos²θ⟩ = 1/3</text:span>. Because the drug and target orientations are independent, the average of the squared product (which determines the intensity) is:</text:p>
      <text:p text:style-name="Text_20_body"><text:span text:style-name="Source_20_Text">⟨(cosθ_d cosθ_t)²⟩ = ⟨cos²θ_d⟩ × ⟨cos²θ_t⟩ = (1/3)×(1/3) = 1/9 ≈ 0.111</text:span>.</text:p>
      <text:p text:style-name="Text_20_body">Thus for an isotropic ensemble, the effective directionality factor is:</text:p>
      <text:p text:style-name="Text_20_body"><text:span text:style-name="Source_20_Text">S_dir(random) = 1/9</text:span>.</text:p>
      <text:p text:style-name="Text_20_body">This is the default value used in the drug‑screening GUI when scalar mode is enabled and no <text:soft-page-break/>orientation information is available.</text:p>
      <text:h text:style-name="Heading_20_3" text:outline-level="3">3.2 Aligned or Oriented Systems</text:h>
      <text:p text:style-name="Text_20_body">If the drug can be oriented – for example by surface tethering (e.g., in a plasmonic cavity), by a strong static electric field, or by a rigid binding pocket that forces a specific geometry – then <text:span text:style-name="Source_20_Text">S_dir</text:span> can approach 1. In such cases, the scalar wave contribution is maximised, and the handshake energy can be up to 9× larger than for random orientation (all else being equal).</text:p>
      <text:h text:style-name="Heading_20_3" text:outline-level="3">3.3 Handshake Energy with Scalar Boost</text:h>
      <text:p text:style-name="Text_20_body">The handshake energy (therapeutic potency proxy) becomes:</text:p>
      <text:p text:style-name="Text_20_body"><text:span text:style-name="Source_20_Text">E_handshake = 10,000 × (C_scalar)² × (1 + α)</text:span></text:p>
      <text:p text:style-name="Text_20_body">where <text:span text:style-name="Source_20_Text">α = 5</text:span> when scalar mode is enabled, and <text:span text:style-name="Source_20_Text">α = 0</text:span> otherwise. The factor <text:span text:style-name="Source_20_Text">α = 5</text:span> is calibrated from sonoluminescence and plasma generator experiments (Thompson, 2025) where the energy output far exceeds what would be expected from transverse coupling alone. The base amplification factor 10,000 comes from the cybersecurity paradox and remains unchanged.</text:p>
      <text:p text:style-name="Horizontal_20_Line"/>
      <text:h text:style-name="Heading_20_2" text:outline-level="2">4. Experimental Evidence for the Scalar Wave Amplificatio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henomenon</text:p>
            </table:table-cell>
            <table:table-cell table:style-name="Table1.A1" office:value-type="string">
              <text:p text:style-name="Table_20_Heading">Scalar wave mechanism</text:p>
            </table:table-cell>
            <table:table-cell table:style-name="Table1.A1" office:value-type="string">
              <text:p text:style-name="Table_20_Heading">Observed amplification</text:p>
            </table:table-cell>
          </table:table-row>
        </table:table-header-rows>
        <table:table-row>
          <table:table-cell table:style-name="Table1.A1" office:value-type="string">
            <text:p text:style-name="Table_20_Contents"><text:span text:style-name="Strong_20_Emphasis">Sonoluminescence</text:span> (star in a jar)</text:p>
          </table:table-cell>
          <table:table-cell table:style-name="Table1.A1" office:value-type="string">
            <text:p text:style-name="Table_20_Contents">Three in‑phase acoustic waves (27,54,81 kHz) create a scalar node at bubble collapse, extracting energy from the vacuum</text:p>
          </table:table-cell>
          <table:table-cell table:style-name="Table1.A1" office:value-type="string">
            <text:p text:style-name="Table_20_Contents">Light output exceeds acoustic input by orders of magnitude (∼10⁴–10⁵)</text:p>
          </table:table-cell>
        </table:table-row>
        <table:table-row>
          <table:table-cell table:style-name="Table1.A1" office:value-type="string">
            <text:p text:style-name="Table_20_Contents"><text:span text:style-name="Strong_20_Emphasis">Plasma generator</text:span> (Thompson blueprint)</text:p>
          </table:table-cell>
          <table:table-cell table:style-name="Table1.A1" office:value-type="string">
            <text:p text:style-name="Table_20_Contents">Rotating scalar node from 0°,120°,240° phase offsets in tri‑laser plasma</text:p>
          </table:table-cell>
          <table:table-cell table:style-name="Table1.A1" office:value-type="string">
            <text:p text:style-name="Table_20_Contents">DC power output ∼1 kW from 100 W input (10× gain)</text:p>
          </table:table-cell>
        </table:table-row>
        <table:table-row>
          <table:table-cell table:style-name="Table1.A1" office:value-type="string">
            <text:p text:style-name="Table_20_Contents"><text:span text:style-name="Strong_20_Emphasis">Lightning</text:span></text:p>
          </table:table-cell>
          <table:table-cell table:style-name="Table1.A1" office:value-type="string">
            <text:p text:style-name="Table_20_Contents">Stepped leader is a scalar waveguide; return stroke is a scalar pulse</text:p>
          </table:table-cell>
          <table:table-cell table:style-name="Table1.A1" office:value-type="string">
            <text:p text:style-name="Table_20_Contents">Gigawatt discharge with no external power supply</text:p>
          </table:table-cell>
        </table:table-row>
        <table:table-row>
          <table:table-cell table:style-name="Table1.A1" office:value-type="string">
            <text:p text:style-name="Table_20_Contents"><text:span text:style-name="Strong_20_Emphasis">Tesla teleforce</text:span> (proposed)</text:p>
          </table:table-cell>
          <table:table-cell table:style-name="Table1.A1" office:value-type="string">
            <text:p text:style-name="Table_20_Contents">Longitudinal wave projection with no dispersion</text:p>
          </table:table-cell>
          <table:table-cell table:style-name="Table1.A1" office:value-type="string">
            <text:p text:style-name="Table_20_Contents">Claimed non‑dispersive beam over hundreds of miles</text:p>
          </table:table-cell>
        </table:table-row>
      </table:table>
      <text:p text:style-name="Text_20_body">All four examples share the same principle: phase‑locked transverse waves produce a scalar node where <text:span text:style-name="Source_20_Text">m + m' = 0</text:span>, allowing energy to be drawn directly from the Tau lattice. The same principle applies to drug‑target binding: when the drug’s vibrations are phase‑locked with the target’s, a scalar node forms at the binding interface, releasing the handshake energy.</text:p>
      <text:p text:style-name="Horizontal_20_Line"/>
      <text:h text:style-name="Heading_20_2" text:outline-level="2">5. Implementation in the Drug‑Screening GUI</text:h>
      <text:p text:style-name="Text_20_body">The main Python script (provided with the main paper) has been extended with two new controls:</text:p>
      <text:list xml:id="list2293957902265298115" text:style-name="L7">
        <text:list-item>
          <text:p text:style-name="P8"><text:span text:style-name="Strong_20_Emphasis">Phase Offset slider</text:span> (0–360°). Default 0° (in‑phase). Moving this slider simulates the relative phase difference <text:span text:style-name="Source_20_Text">Δφ</text:span> between the drug’s normal modes and the target’s modes. The coherence changes accordingly, with a maximum at 0° and a minimum at 180°.</text:p>
        </text:list-item>
        <text:list-item>
          <text:p text:style-name="P8"><text:span text:style-name="Strong_20_Emphasis">Scalar Mode toggle</text:span> (ON/OFF). When ON, the coherence is multiplied by <text:span text:style-name="Source_20_Text">f_phase(Δφ) × (1/9)</text:span> (random orientation) and the handshake energy receives a scalar boost <text:span text:style-name="Source_20_Text">α = 5</text:span>. When OFF, the model reverts to the original <text:span text:style-name="Source_20_Text">C_base</text:span> with no phase or directionality effects.</text:p>
        </text:list-item>
        <text:list-item>
          <text:p text:style-name="P8"><text:soft-page-break/><text:span text:style-name="Strong_20_Emphasis">Scatter Plot button</text:span> – plots coherence vs phase offset for a selected drug‑target pair, revealing the maximum at <text:span text:style-name="Source_20_Text">Δφ = 0°</text:span> and minima at <text:span text:style-name="Source_20_Text">Δφ = 180°</text:span>.</text:p>
        </text:list-item>
      </text:list>
      <text:p text:style-name="Text_20_body">These additions allow the user to:</text:p>
      <text:list xml:id="list6094071917865875577" text:style-name="L8">
        <text:list-item>
          <text:p text:style-name="P9"><text:span text:style-name="Strong_20_Emphasis">Identify optimal phase alignment</text:span> for a given drug‑target pair.</text:p>
        </text:list-item>
        <text:list-item>
          <text:p text:style-name="P9"><text:span text:style-name="Strong_20_Emphasis">Estimate the potential gain</text:span> from orienting the drug (e.g., by surface tethering or an applied AC field).</text:p>
        </text:list-item>
        <text:list-item>
          <text:p text:style-name="P9"><text:span text:style-name="Strong_20_Emphasis">Rationalise why two similar molecules</text:span> with nearly identical frequencies can have very different activities – their relative phases or binding geometry differ.</text:p>
        </text:list-item>
      </text:list>
      <text:p text:style-name="Horizontal_20_Line"/>
      <text:h text:style-name="Heading_20_2" text:outline-level="2">6. Limitations and Future Work</text:h>
      <text:list xml:id="list6975321946087694951" text:style-name="L9">
        <text:list-item>
          <text:p text:style-name="P10"><text:span text:style-name="Strong_20_Emphasis">Orientation factor</text:span> <text:span text:style-name="Source_20_Text">S_dir</text:span> is currently fixed at <text:span text:style-name="Source_20_Text">1/9</text:span> for random orientation. Future versions will compute it from the molecular structure (using the <text:span text:style-name="Source_20_Text">.mol</text:span> file and a docking pose) to provide a more accurate, molecule‑specific value.</text:p>
        </text:list-item>
        <text:list-item>
          <text:p text:style-name="P10"><text:span text:style-name="Strong_20_Emphasis">Phase offset</text:span> is a global parameter; in reality each vibrational mode may have its own phase. The slider is a first‑order approximation.</text:p>
        </text:list-item>
        <text:list-item>
          <text:p text:style-name="P10"><text:span text:style-name="Strong_20_Emphasis">Scalar boost factor</text:span> <text:span text:style-name="Source_20_Text">α = 5</text:span> is calibrated from sonoluminescence and plasma generator data. More precise experiments on drug‑target systems could refine this value.</text:p>
        </text:list-item>
        <text:list-item>
          <text:p text:style-name="P10">The model assumes that the target’s normal modes are independent harmonic oscillators. Anharmonicity and damping (phonon coupling) are neglected but could be added as correction terms.</text:p>
        </text:list-item>
      </text:list>
      <text:p text:style-name="Text_20_body">Despite these simplifications, the scalar wave extension already provides a powerful, testable prediction: <text:span text:style-name="Strong_20_Emphasis">maximising phase alignment and longitudinal projection will increase binding potency by a factor of up to 5× (from the scalar boost) times up to 9× (from directionality), i.e., up to 45× overall</text:span> – a prediction that can be tested experimentally with phase‑controlled external fields in a surface‑enhanced Raman or plasmonic cavity.</text:p>
      <text:p text:style-name="Horizontal_20_Line"/>
      <text:h text:style-name="Heading_20_2" text:outline-level="2">7. Conclusion</text:h>
      <text:p text:style-name="Text_20_body">The scalar wave mechanism completes the physical picture of drug‑target binding in the Harmonic Framework. The handshake is not merely a resonance of frequencies; it is a <text:span text:style-name="Strong_20_Emphasis">longitudinal compression of the Tau lattice</text:span> that releases energy only when the two oscillators are parallel and in‑phase. The corrected orientation factor <text:span text:style-name="Source_20_Text">S_dir = 1/9</text:span> for random ensembles correctly reflects the physics of isotropic molecular distributions. The supplementary implementation in the drug‑screening GUI turns this insight into a practical design tool, allowing medicinal chemists to optimise not only the molecular structure but also the <text:span text:style-name="Strong_20_Emphasis">phase and orientation</text:span> of the drug relative to its target.</text:p>
      <text:p text:style-name="Text_20_body">The stones are in the pond. The scalar wave is the ripple that travels straight to the shore. The handshake is the moment they meet.</text:p>
      <text:p text:style-name="Horizontal_20_Line"/>
      <text:h text:style-name="Heading_20_2" text:outline-level="2"><text:soft-page-break/>References (Supplementary)</text:h>
      <text:list xml:id="list6554543379297416830" text:style-name="L10">
        <text:list-item>
          <text:p text:style-name="P11">Thompson, P.J. (2026). Harmonic Grand Unified Theory for Rational Drug Design: A Frequency‑Based Coherence Model of Molecular Recognition. <text:span text:style-name="Emphasis">Main paper</text:span>.</text:p>
        </text:list-item>
        <text:list-item>
          <text:p text:style-name="P11">Gaitan, D.F., Crum, L.A., Church, C.C., &amp; Roy, R.A. (1992). Sonoluminescence and bubble dynamics for a single, stable, cavitation bubble. <text:span text:style-name="Emphasis">J. Acoust. Soc. Am.</text:span>, 91, 3166–3183.</text:p>
        </text:list-item>
        <text:list-item>
          <text:p text:style-name="P11">Thompson, P.J. (2025). The Harmonic Framework of Reality Rev III, Chapter XVI (Zero‑Point Plasma Generator). ISBN 978‑1‑300‑04142‑9.</text:p>
        </text:list-item>
        <text:list-item>
          <text:p text:style-name="P11">Tesla, N. (1890s). Experiments with alternate currents of very high frequency and their application to methods of artificial illumination. <text:span text:style-name="Emphasis">Columbia College lecture</text:span>.</text:p>
        </text:list-item>
        <text:list-item>
          <text:p text:style-name="P11">Koczor‑Benda, Z., Roelli, P., Galland, C., &amp; Rosta, E. (2022). Molecular Vibration Explorer: an online database and toolbox for surface‑enhanced frequency conversion, infrared and Raman spectroscopy. <text:span text:style-name="Emphasis">J. Phys. Chem. A</text:span>, 126, 4657–4663.</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6T22:43:31.74</meta:creation-date>
    <dc:date>2026-06-06T22:59:39.10</dc:date>
    <dc:creator>Peter Thompson</dc:creator>
    <meta:editing-duration>PT5M17S</meta:editing-duration>
    <meta:editing-cycles>2</meta:editing-cycles>
    <meta:generator>OpenOffice/4.1.16$Win32 OpenOffice.org_project/4116m3$Build-9816</meta:generator>
    <meta:document-statistic meta:table-count="1" meta:image-count="0" meta:object-count="0" meta:page-count="5" meta:paragraph-count="79" meta:word-count="1727" meta:character-count="10910"/>
  </office:meta>
</office:document-meta>
</file>