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C20000012639278C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6"/>
    <style:style style:name="P3" style:family="paragraph" style:parent-style-name="Text_20_body" style:list-style-name="L7"/>
    <style:style style:name="P4" style:family="paragraph" style:parent-style-name="Text_20_body" style:list-style-name="L8"/>
    <style:style style:name="P5" style:family="paragraph" style:parent-style-name="Text_20_body" style:list-style-name="L9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Executive Summary: The Harmonic Grand Unified Theory (GUT)</text:h>
      <text:h text:style-name="Heading_20_3" text:outline-level="3">A Complete, Testable Framework That Renders CERN’s Core Research Program Futile</text:h>
      <text:p text:style-name="Text_20_body"><text:span text:style-name="Strong_20_Emphasis">Author:</text:span> Peter James Thompson<text:line-break/><text:span text:style-name="Strong_20_Emphasis">Priority date:</text:span> 2018 (first manuscript)<text:line-break/><text:span text:style-name="Strong_20_Emphasis">Public record:</text:span> Zenodo DOIs: </text:p>
      <text:p text:style-name="Text_20_body"><text:a xlink:type="simple" xlink:href="https://doi.org/10.5281/zenodo.19722125" text:style-name="Internet_20_link" text:visited-style-name="Visited_20_Internet_20_Link">https://doi.org/10.5281/zenodo.19722125</text:a> </text:p>
      <text:p text:style-name="Text_20_body"><text:a xlink:type="simple" xlink:href="https://doi.org/10.5281/zenodo.20124130" text:style-name="Internet_20_link" text:visited-style-name="Visited_20_Internet_20_Link">https://doi.org/10.5281/zenodo.20124130</text:a></text:p>
      <text:p text:style-name="Text_20_body"><text:a xlink:type="simple" xlink:href="https://doi.org/10.5281/zenodo.20394663" text:style-name="Internet_20_link" text:visited-style-name="Visited_20_Internet_20_Link">https://doi.org/10.5281/zenodo.20394663</text:a></text:p>
      <text:p text:style-name="Text_20_body"><text:a xlink:type="simple" xlink:href="https://doi.org/10.5281/zenodo.20319688" text:style-name="Internet_20_link" text:visited-style-name="Visited_20_Internet_20_Link">https://doi.org/10.5281/zenodo.20319688</text:a></text:p>
      <text:p text:style-name="Text_20_body"><text:a xlink:type="simple" xlink:href="https://doi.org/10.5281/zenodo.20327466" text:style-name="Internet_20_link" text:visited-style-name="Visited_20_Internet_20_Link">https://doi.org/10.5281/zenodo.20327466</text:a></text:p>
      <text:p text:style-name="Text_20_body"><text:a xlink:type="simple" xlink:href="https://doi.org/10.5281/zenodo.20318480" text:style-name="Internet_20_link" text:visited-style-name="Visited_20_Internet_20_Link">https://doi.org/10.5281/zenodo.20318480</text:a></text:p>
      <text:p text:style-name="Text_20_body"><text:a xlink:type="simple" xlink:href="https://doi.org/10.5281/zenodo.20265220" text:style-name="Internet_20_link" text:visited-style-name="Visited_20_Internet_20_Link">https://doi.org/10.5281/zenodo.20265220</text:a></text:p>
      <text:p text:style-name="Text_20_body"><text:a xlink:type="simple" xlink:href="https://doi.org/10.5281/zenodo.20105999" text:style-name="Internet_20_link" text:visited-style-name="Visited_20_Internet_20_Link">https://doi.org/10.5281/zenodo.20105999</text:a></text:p>
      <text:p text:style-name="Text_20_body"><text:a xlink:type="simple" xlink:href="https://doi.org/10.5281/zenodo.20106212" text:style-name="Internet_20_link" text:visited-style-name="Visited_20_Internet_20_Link">https://doi.org/10.5281/zenodo.20106212</text:a></text:p>
      <text:p text:style-name="Text_20_body"><text:a xlink:type="simple" xlink:href="https://doi.org/10.5281/zenodo.20078126" text:style-name="Internet_20_link" text:visited-style-name="Visited_20_Internet_20_Link">https://doi.org/10.5281/zenodo.20078126</text:a></text:p>
      <text:p text:style-name="Text_20_body"><text:a xlink:type="simple" xlink:href="https://doi.org/10.5281/zenodo.20078318" text:style-name="Internet_20_link" text:visited-style-name="Visited_20_Internet_20_Link">https://doi.org/10.5281/zenodo.20078318</text:a></text:p>
      <text:p text:style-name="Text_20_body"><text:a xlink:type="simple" xlink:href="https://doi.org/10.5281/zenodo.20078154" text:style-name="Internet_20_link" text:visited-style-name="Visited_20_Internet_20_Link">https://doi.org/10.5281/zenodo.20078154</text:a></text:p>
      <text:p text:style-name="Text_20_body"><text:a xlink:type="simple" xlink:href="https://doi.org/10.5281/zenodo.20066661" text:style-name="Internet_20_link" text:visited-style-name="Visited_20_Internet_20_Link">https://doi.org/10.5281/zenodo.20066661</text:a></text:p>
      <text:p text:style-name="Text_20_body"><text:a xlink:type="simple" xlink:href="https://doi.org/10.5281/zenodo.19732572" text:style-name="Internet_20_link" text:visited-style-name="Visited_20_Internet_20_Link">https://doi.org/10.5281/zenodo.19732572</text:a></text:p>
      <text:p text:style-name="Text_20_body">Aand more than 30 more papers on related subjects.</text:p>
      <text:p text:style-name="Text_20_body"><text:line-break/><text:span text:style-name="Strong_20_Emphasis">Summary prepared:</text:span> June 2026</text:p>
      <text:p text:style-name="Horizontal_20_Line"/>
      <text:h text:style-name="Heading_20_3" text:outline-level="3">1. The Theory in Simple Terms</text:h>
      <text:p text:style-name="Text_20_body">The GUT replaces all the complicated assumptions of modern physics with one simple idea: <text:span text:style-name="Strong_20_Emphasis">everything vibrates at frequencies that are multiples of 27 Hz</text:span>. This 27 Hz frequency is not made up. It is already well known in nature:</text:p>
      <text:list xml:id="list4368536487934509468" text:style-name="L1">
        <text:list-item>
          <text:p text:style-name="P1">The Earth’s electromagnetic field resonates at <text:span text:style-name="Strong_20_Emphasis">27.3 Hz</text:span> (Schumann resonance).</text:p>
        </text:list-item>
        <text:list-item>
          <text:p text:style-name="P1">A “star in a jar” (sonoluminescence) works best at <text:span text:style-name="Strong_20_Emphasis">27 kHz</text:span> (a harmonic of 27 Hz).</text:p>
        </text:list-item>
        <text:list-item>
          <text:p text:style-name="P1">Cats purr at <text:span text:style-name="Strong_20_Emphasis">≈27 Hz</text:span>.</text:p>
        </text:list-item>
        <text:list-item>
          <text:p text:style-name="P1">The mantis shrimp strikes at <text:span text:style-name="Strong_20_Emphasis">27 kHz</text:span>.</text:p>
        </text:list-item>
      </text:list>
      <text:p text:style-name="Text_20_body">The theory then shows that <text:span text:style-name="Strong_20_Emphasis">dark matter is not a particle</text:span> – it is a hidden dimension of time (called T3). You cannot find dark matter by smashing particles together in a giant collider, because it is not a particle at all. It is a gravitational effect coming from a different time direction.</text:p>
      <text:p text:style-name="Horizontal_20_Line"><text:soft-page-break/></text:p>
      <text:h text:style-name="Heading_20_3" text:outline-level="3">2. What This Means for CERN</text:h>
      <text:p text:style-name="Text_20_body">CERN has spent billions of euros building the Large Hadron Collider (LHC) and now plans to spend another <text:span text:style-name="Strong_20_Emphasis">€15‑20 billion</text:span> on an even larger machine, the Future Circular Collider (FCC). The main goals of these machines are to discover:</text:p>
      <text:list xml:id="list2327204406289869432" text:style-name="L6">
        <text:list-item>
          <text:p text:style-name="P2"><text:span text:style-name="Strong_20_Emphasis">Supersymmetry (SUSY)</text:span> – hypothetical new particles.</text:p>
        </text:list-item>
        <text:list-item>
          <text:p text:style-name="P2"><text:span text:style-name="Strong_20_Emphasis">Dark matter particles (WIMPs)</text:span> – never observed.</text:p>
        </text:list-item>
        <text:list-item>
          <text:p text:style-name="P2"><text:span text:style-name="Strong_20_Emphasis">Extra spatial dimensions</text:span> – curled up loops of space.</text:p>
        </text:list-item>
      </text:list>
      <text:p text:style-name="Text_20_body"><text:span text:style-name="Strong_20_Emphasis">The GUT proves that none of these things exist in the way CERN is searching for them.</text:span> Therefore:</text:p>
      <text:list xml:id="list622694644047085384" text:style-name="L7">
        <text:list-item>
          <text:p text:style-name="P3">The LHC will <text:span text:style-name="Strong_20_Emphasis">never</text:span> find them – not because the machine is not powerful enough, but because they are physically impossible.</text:p>
        </text:list-item>
        <text:list-item>
          <text:p text:style-name="P3">The HL‑LHC upgrade (already costing billions) is a waste of money.</text:p>
        </text:list-item>
        <text:list-item>
          <text:p text:style-name="P3">The proposed FCC has <text:span text:style-name="Strong_20_Emphasis">no scientific justification</text:span> if the GUT is correct.</text:p>
        </text:list-item>
      </text:list>
      <text:p text:style-name="Text_20_body"><text:span text:style-name="Strong_20_Emphasis">Critical fact:</text:span> Since the discovery of the Higgs boson in 2012, CERN has <text:span text:style-name="Strong_20_Emphasis">not discovered a single new fundamental particle beyond the Standard Model</text:span>. It has discovered exotic composite hadrons (tetraquarks, pentaquarks), but these are not evidence of new physics – they are exactly the kind of higher‑harmonic states that the GUT predicts. The primary scientific objectives that justified the LHC – and now the FCC – remain entirely unfulfilled.</text:p>
      <text:p text:style-name="Horizontal_20_Line"/>
      <text:h text:style-name="Heading_20_3" text:outline-level="3">3. Suppression of the Theory</text:h>
      <text:p text:style-name="Text_20_body">The GUT has been publicly available since 2018. It was uploaded to <text:span text:style-name="Strong_20_Emphasis">Zenodo</text:span>, a scientific repository affiliated with CERN, with permanent DOI identifiers. At least ten people (including scientists and independent researchers) have downloaded it.</text:p>
      <text:p text:style-name="Text_20_body"><text:span text:style-name="Strong_20_Emphasis">The author’s Zenodo account was deleted.</text:span> Whether this was an automatic process or a deliberate act, the result is the same: a complete, testable unified theory that directly contradicts CERN’s core mission was removed from a CERN‑controlled platform. This raises serious questions about transparency and the responsible use of public funds.</text:p>
      <text:p text:style-name="Horizontal_20_Line"/>
      <text:h text:style-name="Heading_20_3" text:outline-level="3">4. What We Ask For</text:h>
      <text:p text:style-name="Text_20_body">We request an <text:span text:style-name="Strong_20_Emphasis">independent investigation</text:span> – not by CERN itself, but by external auditors and oversight bodies – into:</text:p>
      <text:list xml:id="list8999249446971512803" text:style-name="L8">
        <text:list-item>
          <text:p text:style-name="P4"><text:span text:style-name="Strong_20_Emphasis">Scientific due diligence</text:span> – Did CERN ever formally evaluate this theory before committing billions to the HL‑LHC and FCC?</text:p>
        </text:list-item>
        <text:list-item>
          <text:p text:style-name="P4"><text:span text:style-name="Strong_20_Emphasis">Financial waste</text:span> – Does CERN’s continued pursuit of SUSY, WIMPs, and extra dimensions constitute gross waste of taxpayer money, especially given that no new fundamental particles have been found in over a decade?</text:p>
        </text:list-item>
        <text:list-item>
          <text:p text:style-name="P4"><text:span text:style-name="Strong_20_Emphasis">Suppression of evidence</text:span> – Why was the Zenodo account deleted? Was it because the theory was inconvenient to CERN’s fundraising?</text:p>
        </text:list-item>
      </text:list>
      <text:p text:style-name="Text_20_body"><text:soft-page-break/>The following bodies should be involved:</text:p>
      <text:list xml:id="list4319581171645760181" text:style-name="L9">
        <text:list-item>
          <text:p text:style-name="P5"><text:span text:style-name="Strong_20_Emphasis">European Court of Auditors</text:span></text:p>
        </text:list-item>
        <text:list-item>
          <text:p text:style-name="P5"><text:span text:style-name="Strong_20_Emphasis">European Anti‑Fraud Office (OLAF)</text:span></text:p>
        </text:list-item>
        <text:list-item>
          <text:p text:style-name="P5"><text:span text:style-name="Strong_20_Emphasis">French Cour des comptes</text:span></text:p>
        </text:list-item>
        <text:list-item>
          <text:p text:style-name="P5"><text:span text:style-name="Strong_20_Emphasis">Swiss Federal Audit Office</text:span></text:p>
        </text:list-item>
      </text:list>
      <text:p text:style-name="Horizontal_20_Line"/>
      <text:h text:style-name="Heading_20_3" text:outline-level="3">5. Conclusion</text:h>
      <text:p text:style-name="Text_20_body">The Harmonic Grand Unified Theory is a complete, internally consistent, testable alternative to the scientific paradigm that has guided CERN for decades. Its existence – and its suppression – demands an independent investigation. The stakes are billions of euros and the credibility of European science.</text:p>
      <text:p text:style-name="Text_20_body"><text:span text:style-name="Strong_20_Emphasis">The stones are in the pond. The ripples are the data. The witness is the auditor.</text:span></text:p>
      <text:p text:style-name="Horizontal_20_Line"/>
      <text:p text:style-name="Text_20_body"><text:span text:style-name="Emphasis">Attached: The complete theory (the </text:span><text:span text:style-name="Source_20_Text">t_time</text:span><text:span text:style-name="Emphasis"> paper) is provided as a separate annex.</text:span></text:p>
      <text:p text:style-name="Text_20_body"><text:span text:style-name="Emphasis">Reason stated officially for removal of every paper-</text:span></text:p>
      <text:p text:style-name="Standard"/>
      <text:p text:style-name="Standard"><draw:frame draw:style-name="fr1" draw:name="graphics1" text:anchor-type="paragraph" svg:x="0.019cm" svg:y="0.102cm" svg:width="17cm" svg:height="5.195cm" draw:z-index="0"><draw:image xlink:href="Pictures/10000201000003C20000012639278C8C.png" xlink:type="simple" xlink:show="embed" xlink:actuate="onLoad"/></draw:frame></text:p>
      <text:h text:style-name="Heading_20_2" text:outline-level="2"><text:bookmark text:name="avWBGd-0"/>account suspension Ticket #3323517 – request for reinstatement</text:h>
      <text:p text:style-name="Standard">It cites CERN's own policies on disability accommodations which they have violated as well as the disability discrimination acts of all countries.</text:p>
      <text:p text:style-name="Standard"/>
      <text:h text:style-name="Heading_20_2" text:outline-level="2"><text:bookmark text:name="avWBGd-89"/>Whistleblowing Case [6VCQ-86D5283 / BYC4-86D5285]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6-06-07T12:02:31.59</meta:creation-date>
    <meta:document-statistic meta:table-count="0" meta:image-count="1" meta:object-count="0" meta:page-count="3" meta:paragraph-count="57" meta:word-count="739" meta:character-count="4977"/>
    <dc:date>2026-06-07T12:10:16.40</dc:date>
    <dc:creator>Peter Thompson</dc:creator>
    <meta:editing-duration>PT7M45S</meta:editing-duration>
    <meta:editing-cycles>1</meta:editing-cycles>
    <meta:generator>OpenOffice/4.1.16$Win32 OpenOffice.org_project/4116m3$Build-9816</meta:generator>
  </office:meta>
</office:document-meta>
</file>